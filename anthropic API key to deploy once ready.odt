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-ant-api03-4KaBRljSOkihZgDgrT2nNjjlhE9GAsLUhAVnRQfLP6SQkYgmRjju7ZrotFS8LSDQwuG2X21osutNVK7p6pCKcw-g35oRAA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9T12:49:44.994567716</meta:creation-date>
    <dc:date>2026-06-29T12:54:16.863058926</dc:date>
    <meta:editing-duration>PT4M37S</meta:editing-duration>
    <meta:editing-cycles>1</meta:editing-cycles>
    <meta:document-statistic meta:table-count="0" meta:image-count="0" meta:object-count="0" meta:page-count="1" meta:paragraph-count="1" meta:word-count="1" meta:character-count="108" meta:non-whitespace-character-count="108"/>
    <meta:generator>LibreOffice/26.2.2.2$Linux_X86_64 LibreOffice_project/620$Build-2</meta:generator>
  </office:meta>
</office:document-meta>
</file>